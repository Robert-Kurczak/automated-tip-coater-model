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SauceCodePro NF" svg:font-family="'SauceCodePro NF'" style:font-family-generic="swiss" style:font-pitch="variable"/>
    <style:font-face style:name="SauceCodePro NF1" svg:font-family="'SauceCodePro NF'" style:font-pitch="fixed"/>
    <style:font-face style:name="SauceCodePro NF2" svg:font-family="'SauceCodePro NF'" style:font-family-generic="roman" style:font-pitch="variable"/>
    <style:font-face style:name="SauceCodePro NF3" svg:font-family="'SauceCodePro NF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3.2791in"/>
    </style:style>
    <style:style style:name="co3" style:family="table-column">
      <style:table-column-properties fo:break-before="auto" style:column-width="1.6126in"/>
    </style:style>
    <style:style style:name="co4" style:family="table-column">
      <style:table-column-properties fo:break-before="auto" style:column-width="2.81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2.850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7917in"/>
    </style:style>
    <style:style style:name="co10" style:family="table-column">
      <style:table-column-properties fo:break-before="auto" style:column-width="2.2764in"/>
    </style:style>
    <style:style style:name="co11" style:family="table-column">
      <style:table-column-properties fo:break-before="auto" style:column-width="2.1193in"/>
    </style:style>
    <style:style style:name="co12" style:family="table-column">
      <style:table-column-properties fo:break-before="auto" style:column-width="1.3874in"/>
    </style:style>
    <style:style style:name="co13" style:family="table-column">
      <style:table-column-properties fo:break-before="auto" style:column-width="1.778in"/>
    </style:style>
    <style:style style:name="co14" style:family="table-column">
      <style:table-column-properties fo:break-before="auto" style:column-width="1.8335in"/>
    </style:style>
    <style:style style:name="co15" style:family="table-column">
      <style:table-column-properties fo:break-before="auto" style:column-width="1.244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SauceCodePro NF1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SauceCodePro NF2" fo:font-size="10pt" style:font-name-asian="Cantarell" style:font-size-asian="10pt" style:font-name-complex="FreeSerif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auceCodePro NF2" style:font-name-asian="Cantarell" style:font-name-complex="FreeSerif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auceCodePro NF1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auceCodePro NF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5" table:number-columns-repeated="16374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4" table:number-columns-repeated="2"/>
          <table:table-cell table:style-name="ce1" table:number-columns-repeated="16372"/>
          <table:table-cell table:number-columns-repeated="5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base-top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260x180mm plane, custom cutout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base</text:p>
          </table:table-cell>
          <table:table-cell office:value-type="string" calcext:value-type="string">
            <text:p>base-left-side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60x180mm plane, custom cuto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base-right-side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60x180mm plane, custom cutout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base</text:p>
          </table:table-cell>
          <table:table-cell office:value-type="string" calcext:value-type="string">
            <text:p>v-slot-2060x250mm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2060x250mm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2020x250mm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2020x250mm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l-bracket-triple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l-bracket-triple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l-bracket-triple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v-slot-l-bracket-triple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17hs4023-stepper-moto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gt2-5mm-16t-belt-gea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base-bottom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260x180mm plane, custom cuto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base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72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72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tray-carriage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tray-carriage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lm8uu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lm8uu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wk1-01-limit-switch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wk1-01-limit-switch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tray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tray-carriage-belt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lw980-heater-tray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CN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ceramic-tape-insert-40x2mm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lw980-ceramic-heate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heater-module-mounting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gt2-5mm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ater-module</text:p>
          </table:table-cell>
          <table:table-cell office:value-type="string" calcext:value-type="string">
            <text:p>gt2-5mm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tation-module</text:p>
          </table:table-cell>
          <table:table-cell office:value-type="string" calcext:value-type="string">
            <text:p>rotation-module-mounting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tation-module</text:p>
          </table:table-cell>
          <table:table-cell office:value-type="string" calcext:value-type="string">
            <text:p>rotation-module-mounting-bracket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tation-module</text:p>
          </table:table-cell>
          <table:table-cell office:value-type="string" calcext:value-type="string">
            <text:p>pololu-3042-dc-moto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tation-module</text:p>
          </table:table-cell>
          <table:table-cell office:value-type="string" calcext:value-type="string">
            <text:p>bd-microlance-3-26g-needle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7mm needle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motor-mounting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end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carriage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carriage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lm8uu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gt2-5mm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lm8uu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17hs4023-stepper-moto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gt2-5mm-16t-belt-gea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wk1-01-limit-switch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wk1-01-limit-switch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200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x-axis</text:p>
          </table:table-cell>
          <table:table-cell office:value-type="string" calcext:value-type="string">
            <text:p>x-axis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200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shafts-mounting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17hs8401-stepper-moto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197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8mm-linear-shaft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197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5x8mm-flexible-coupler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tr8x2-lead-screw</text:p>
          </table:table-cell>
          <table:table-cell office:value-type="string" calcext:value-type="string">
            <text:p>External-custom</text:p>
          </table:table-cell>
          <table:table-cell office:value-type="string" calcext:value-type="string">
            <text:p>113mm leng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lm8uu-45mm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lm8uu-45mm-linear-bearing</text:p>
          </table:table-cell>
          <table:table-cell office:value-type="string" calcext:value-type="string">
            <text:p>Exter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carriage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carriage-bearing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-axis</text:p>
          </table:table-cell>
          <table:table-cell office:value-type="string" calcext:value-type="string">
            <text:p>z-axis-carriage-bearing-cap</text:p>
          </table:table-cell>
          <table:table-cell office:value-type="string" calcext:value-type="string">
            <text:p>3D Print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ternal" table:style-name="ta1">
        <office:forms form:automatic-focus="false" form:apply-design-mode="false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4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2" table:default-cell-style-name="ce14"/>
        <table:table-column table:style-name="co5" table:number-columns-repeated="10" table:default-cell-style-name="ce16"/>
        <table:table-column table:style-name="co15" table:default-cell-style-name="ce16"/>
        <table:table-column table:style-name="co5" table:number-columns-repeated="16361" table:default-cell-style-name="ce16"/>
        <table:table-column table:style-name="co5" table:number-columns-repeated="2" table:default-cell-style-name="ce14"/>
        <table:table-row table:style-name="ro1"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Link</text:p>
          </table:table-cell>
          <table:table-cell table:style-name="ce13" office:value-type="string" calcext:value-type="string">
            <text:p>Price per item [PLN]</text:p>
          </table:table-cell>
          <table:table-cell table:style-name="ce13" office:value-type="string" calcext:value-type="string">
            <text:p>Price [PLN]</text:p>
          </table:table-cell>
          <table:table-cell table:style-name="ce31" office:value-type="string" calcext:value-type="string">
            <text:p>Total price [PLN]</text:p>
          </table:table-cell>
          <table:table-cell table:style-name="ce19" table:number-columns-repeated="2"/>
          <table:table-cell table:style-name="ce13" table:number-columns-repeated="16372"/>
          <table:table-cell table:style-name="ce19" table:number-columns-repeated="2"/>
        </table:table-row>
        <table:table-row table:style-name="ro1">
          <table:table-cell table:style-name="ce14" table:number-matrix-columns-spanned="1" table:number-matrix-rows-spanned="14" table:formula="of:=COM.MICROSOFT.UNIQUE(COM.MICROSOFT.FILTER([$'Parts list'.B2:.B1048576]; [$'Parts list'.C2:.C1048576] = &quot;External&quot;))" office:value-type="string" office:string-value="v-slot-2060x250mm" calcext:value-type="string">
            <text:p>v-slot-2060x250mm</text:p>
          </table:table-cell>
          <table:table-cell table:style-name="ce14" table:formula="of:=VLOOKUP([.A2];[$'Parts list'.B:.D];3;0)" office:value-type="float" office:value="0" calcext:value-type="float">
            <text:p/>
          </table:table-cell>
          <table:table-cell table:style-name="ce15" table:formula="of:=COUNTIF([$'Parts list'.$B$2:.$B$1048576]; [.A2])" office:value-type="float" office:value="2" calcext:value-type="float">
            <text:p>2</text:p>
          </table:table-cell>
          <table:table-cell office:value-type="string" calcext:value-type="string">
            <text:p><text:a xlink:href="https://www.v-slot.pl/pl/p/V-SLOT-2060-Czarny-Anodowany-250mm/54" xlink:type="simple">v-slot.pl</text:a></text:p>
          </table:table-cell>
          <table:table-cell table:style-name="ce27" office:value-type="float" office:value="20" calcext:value-type="float">
            <text:p>20.00</text:p>
          </table:table-cell>
          <table:table-cell table:style-name="ce27" table:formula="of:=[.E2] * [.C2]" office:value-type="float" office:value="40" calcext:value-type="float">
            <text:p>40.00</text:p>
          </table:table-cell>
          <table:table-cell table:formula="of:=SUM([.F2:.F1048576])" office:value-type="float" office:value="431.28" calcext:value-type="float">
            <text:p>431.28</text:p>
          </table:table-cell>
          <table:table-cell table:number-columns-repeated="16376"/>
        </table:table-row>
        <table:table-row table:style-name="ro1">
          <table:table-cell table:style-name="ce22" office:value-type="string" office:string-value="v-slot-2020x250mm" calcext:value-type="string">
            <text:p>v-slot-2020x250mm</text:p>
          </table:table-cell>
          <table:table-cell table:style-name="ce14" table:formula="of:=VLOOKUP([.A3];[$'Parts list'.B:.D];3;0)" office:value-type="float" office:value="0" calcext:value-type="float">
            <text:p/>
          </table:table-cell>
          <table:table-cell table:style-name="ce15" table:formula="of:=COUNTIF([$'Parts list'.$B$2:.$B$1048576]; [.A3])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v-slot.pl/pl/p/Profil-aluminiowy-konstrukcyjny-V-Slot-2020-Na-wymiar-BLACK/906" xlink:type="simple">v-slot.pl</text:a></text:p>
          </table:table-cell>
          <table:table-cell table:style-name="ce28" office:value-type="float" office:value="12" calcext:value-type="float">
            <text:p>12.00</text:p>
          </table:table-cell>
          <table:table-cell table:style-name="ce27" table:formula="of:=[.E3] * [.C3]" office:value-type="float" office:value="24" calcext:value-type="float">
            <text:p>24.0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v-slot-l-bracket-triple" calcext:value-type="string">
            <text:p>v-slot-l-bracket-triple</text:p>
          </table:table-cell>
          <table:table-cell table:style-name="ce14" table:formula="of:=VLOOKUP([.A4];[$'Parts list'.B:.D];3;0)" office:value-type="float" office:value="0" calcext:value-type="float">
            <text:p/>
          </table:table-cell>
          <table:table-cell table:style-name="ce15" table:formula="of:=COUNTIF([$'Parts list'.$B$2:.$B$1048576]; [.A4])" office:value-type="float" office:value="4" calcext:value-type="float">
            <text:p>4</text:p>
          </table:table-cell>
          <table:table-cell office:value-type="string" calcext:value-type="string">
            <text:p><text:a xlink:href="https://www.v-slot.pl/pl/p/Naroznik-typ-L-potrojny-OpenBuilds/224" xlink:type="simple">v-slot.pl</text:a></text:p>
          </table:table-cell>
          <table:table-cell office:value-type="float" office:value="6.99" calcext:value-type="float">
            <text:p>6.99</text:p>
          </table:table-cell>
          <table:table-cell table:style-name="ce27" table:formula="of:=[.E4] * [.C4]" office:value-type="float" office:value="27.96" calcext:value-type="float">
            <text:p>27.96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17hs4023-stepper-motor" calcext:value-type="string">
            <text:p>17hs4023-stepper-motor</text:p>
          </table:table-cell>
          <table:table-cell table:style-name="ce14" table:formula="of:=VLOOKUP([.A5];[$'Parts list'.B:.D];3;0)" office:value-type="float" office:value="0" calcext:value-type="float">
            <text:p/>
          </table:table-cell>
          <table:table-cell table:style-name="ce15" table:formula="of:=COUNTIF([$'Parts list'.$B$2:.$B$1048576]; [.A5])" office:value-type="float" office:value="2" calcext:value-type="float">
            <text:p>2</text:p>
          </table:table-cell>
          <table:table-cell office:value-type="string" calcext:value-type="string">
            <text:p><text:a xlink:href="https://allegro.pl/oferta/silnik-krokowy-nema17-17hs4023-pancake-23mm-118g-16010231320" xlink:type="simple">allegro.pl-Fotobisti_pl</text:a></text:p>
          </table:table-cell>
          <table:table-cell office:value-type="float" office:value="35.85" calcext:value-type="float">
            <text:p>35.85</text:p>
          </table:table-cell>
          <table:table-cell table:style-name="ce27" table:formula="of:=[.E5] * [.C5]" office:value-type="float" office:value="71.7" calcext:value-type="float">
            <text:p>71.7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gt2-5mm-16t-belt-gear" calcext:value-type="string">
            <text:p>gt2-5mm-16t-belt-gear</text:p>
          </table:table-cell>
          <table:table-cell table:style-name="ce14" table:formula="of:=VLOOKUP([.A6];[$'Parts list'.B:.D];3;0)" office:value-type="float" office:value="0" calcext:value-type="float">
            <text:p/>
          </table:table-cell>
          <table:table-cell table:style-name="ce15" table:formula="of:=COUNTIF([$'Parts list'.$B$2:.$B$1048576]; [.A6])" office:value-type="float" office:value="2" calcext:value-type="float">
            <text:p>2</text:p>
          </table:table-cell>
          <table:table-cell office:value-type="string" calcext:value-type="string">
            <text:p><text:a xlink:href="https://abc-rc.pl/pl/products/zebatka-gt2-16-zebow-5mm-drukarka-3d-reprap-3d-cnc-6732.html" xlink:type="simple">abc-rc.pl</text:a></text:p>
          </table:table-cell>
          <table:table-cell table:style-name="ce29" office:value-type="float" office:value="3.1" calcext:value-type="float">
            <text:p>3.10</text:p>
          </table:table-cell>
          <table:table-cell table:style-name="ce27" table:formula="of:=[.E6] * [.C6]" office:value-type="float" office:value="6.2" calcext:value-type="float">
            <text:p>6.2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lm8uu-linear-bearing" calcext:value-type="string">
            <text:p>lm8uu-linear-bearing</text:p>
          </table:table-cell>
          <table:table-cell table:style-name="ce14" table:formula="of:=VLOOKUP([.A7];[$'Parts list'.B:.D];3;0)" office:value-type="float" office:value="0" calcext:value-type="float">
            <text:p/>
          </table:table-cell>
          <table:table-cell table:style-name="ce15" table:formula="of:=COUNTIF([$'Parts list'.$B$2:.$B$1048576]; [.A7])" office:value-type="float" office:value="4" calcext:value-type="float">
            <text:p>4</text:p>
          </table:table-cell>
          <table:table-cell office:value-type="string" calcext:value-type="string">
            <text:p><text:a xlink:href="https://abc-rc.pl/pl/products/lozysko-liniowe-lm8uu-8mm-reprap-3d-cnc-6735.html" xlink:type="simple">abc-rc.pl</text:a></text:p>
          </table:table-cell>
          <table:table-cell table:style-name="ce29" office:value-type="float" office:value="3" calcext:value-type="float">
            <text:p>3.00</text:p>
          </table:table-cell>
          <table:table-cell table:style-name="ce27" table:formula="of:=[.E7] * [.C7]" office:value-type="float" office:value="12" calcext:value-type="float">
            <text:p>12.0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wk1-01-limit-switch" calcext:value-type="string">
            <text:p>wk1-01-limit-switch</text:p>
          </table:table-cell>
          <table:table-cell table:style-name="ce14" table:formula="of:=VLOOKUP([.A8];[$'Parts list'.B:.D];3;0)" office:value-type="float" office:value="0" calcext:value-type="float">
            <text:p/>
          </table:table-cell>
          <table:table-cell table:style-name="ce15" table:formula="of:=COUNTIF([$'Parts list'.$B$2:.$B$1048576]; [.A8])" office:value-type="float" office:value="4" calcext:value-type="float">
            <text:p>4</text:p>
          </table:table-cell>
          <table:table-cell office:value-type="string" calcext:value-type="string">
            <text:p><text:a xlink:href="https://abc-rc.pl/pl/products/wylacznik-krancowy-wk1-01-1a-125v-przelacznik-przyciskowy-20701.html" xlink:type="simple">abc-rc.pl</text:a></text:p>
          </table:table-cell>
          <table:table-cell table:style-name="ce29" office:value-type="float" office:value="0.9" calcext:value-type="float">
            <text:p>0.90</text:p>
          </table:table-cell>
          <table:table-cell table:style-name="ce27" table:formula="of:=[.E8] * [.C8]" office:value-type="float" office:value="3.6" calcext:value-type="float">
            <text:p>3.6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ceramic-tape-insert-40x2mm" calcext:value-type="string">
            <text:p>ceramic-tape-insert-40x2mm</text:p>
          </table:table-cell>
          <table:table-cell table:style-name="ce14" table:formula="of:=VLOOKUP([.A9];[$'Parts list'.B:.D];3;0)" office:value-type="float" office:value="0" calcext:value-type="float">
            <text:p/>
          </table:table-cell>
          <table:table-cell table:style-name="ce15" table:formula="of:=COUNTIF([$'Parts list'.$B$2:.$B$1048576]; [.A9])" office:value-type="float" office:value="1" calcext:value-type="float">
            <text:p>1</text:p>
          </table:table-cell>
          <table:table-cell office:value-type="string" calcext:value-type="string">
            <text:p><text:a xlink:href="https://allegro.pl/oferta/tasma-ceramiczna-zaroodporna-1200-c-do-kominka-40x2-mm-5859353940" xlink:type="simple">allegro.pl-Bomawit</text:a></text:p>
          </table:table-cell>
          <table:table-cell table:style-name="ce29" office:value-type="float" office:value="17.6" calcext:value-type="float">
            <text:p>17.60</text:p>
          </table:table-cell>
          <table:table-cell table:style-name="ce27" table:formula="of:=[.E9] * [.C9]" office:value-type="float" office:value="17.6" calcext:value-type="float">
            <text:p>17.6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lw980-ceramic-heater" calcext:value-type="string">
            <text:p>lw980-ceramic-heater</text:p>
          </table:table-cell>
          <table:table-cell table:style-name="ce14" table:formula="of:=VLOOKUP([.A10];[$'Parts list'.B:.D];3;0)" office:value-type="float" office:value="0" calcext:value-type="float">
            <text:p/>
          </table:table-cell>
          <table:table-cell table:style-name="ce15" table:formula="of:=COUNTIF([$'Parts list'.$B$2:.$B$1048576]; [.A10])" office:value-type="float" office:value="1" calcext:value-type="float">
            <text:p>1</text:p>
          </table:table-cell>
          <table:table-cell office:value-type="string" calcext:value-type="string">
            <text:p><text:a xlink:href="https://allegro.pl/oferta/grzalka-ceramiczna-do-lw-980d-lut-036-7519979241" xlink:type="simple">allegro.pl-GOTRONIK_PL</text:a></text:p>
          </table:table-cell>
          <table:table-cell office:value-type="float" office:value="26.56" calcext:value-type="float">
            <text:p>26.56</text:p>
          </table:table-cell>
          <table:table-cell table:style-name="ce27" table:formula="of:=[.E10] * [.C10]" office:value-type="float" office:value="26.56" calcext:value-type="float">
            <text:p>26.56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gt2-5mm-bearing" calcext:value-type="string">
            <text:p>gt2-5mm-bearing</text:p>
          </table:table-cell>
          <table:table-cell table:style-name="ce14" table:formula="of:=VLOOKUP([.A11];[$'Parts list'.B:.D];3;0)" office:value-type="float" office:value="0" calcext:value-type="float">
            <text:p/>
          </table:table-cell>
          <table:table-cell table:style-name="ce15" table:formula="of:=COUNTIF([$'Parts list'.$B$2:.$B$1048576]; [.A11])" office:value-type="float" office:value="3" calcext:value-type="float">
            <text:p>3</text:p>
          </table:table-cell>
          <table:table-cell table:style-name="ce18" office:value-type="string" calcext:value-type="string">
            <text:p><text:a xlink:href="https://abc-rc.pl/pl/products/kolo-pasowe-gt2-bez-zebow-czarne-os-5mm-na-pasek-6mm-drukarka-3d-reprap-3d-cnc-20537.html" xlink:type="simple">abc-rc.pl</text:a></text:p>
          </table:table-cell>
          <table:table-cell table:style-name="ce29" office:value-type="float" office:value="6.2" calcext:value-type="float">
            <text:p>6.20</text:p>
          </table:table-cell>
          <table:table-cell table:style-name="ce27" table:formula="of:=[.E11] * [.C11]" office:value-type="float" office:value="18.6" calcext:value-type="float">
            <text:p>18.6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pololu-3042-dc-motor" calcext:value-type="string">
            <text:p>pololu-3042-dc-motor</text:p>
          </table:table-cell>
          <table:table-cell table:style-name="ce14" table:formula="of:=VLOOKUP([.A12];[$'Parts list'.B:.D];3;0)" office:value-type="float" office:value="0" calcext:value-type="float">
            <text:p/>
          </table:table-cell>
          <table:table-cell table:style-name="ce15" table:formula="of:=COUNTIF([$'Parts list'.$B$2:.$B$1048576]; [.A12])" office:value-type="float" office:value="1" calcext:value-type="float">
            <text:p>1</text:p>
          </table:table-cell>
          <table:table-cell office:value-type="string" calcext:value-type="string">
            <text:p><text:a xlink:href="https://www.ebmia.pl/silniki-dc-z-przekladnia/217056-silnik-hpcb-150-1-12v-200rpm-zamiennik-pololu-3042.html" xlink:type="simple">ebmia.pl</text:a></text:p>
          </table:table-cell>
          <table:table-cell table:style-name="ce29" office:value-type="float" office:value="35.6" calcext:value-type="float">
            <text:p>35.60</text:p>
          </table:table-cell>
          <table:table-cell table:style-name="ce27" table:formula="of:=[.E12] * [.C12]" office:value-type="float" office:value="35.6" calcext:value-type="float">
            <text:p>35.6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17hs8401-stepper-motor" calcext:value-type="string">
            <text:p>17hs8401-stepper-motor</text:p>
          </table:table-cell>
          <table:table-cell table:style-name="ce14" table:formula="of:=VLOOKUP([.A13];[$'Parts list'.B:.D];3;0)" office:value-type="float" office:value="0" calcext:value-type="float">
            <text:p/>
          </table:table-cell>
          <table:table-cell table:style-name="ce15" table:formula="of:=COUNTIF([$'Parts list'.$B$2:.$B$1048576]; [.A13])" office:value-type="float" office:value="1" calcext:value-type="float">
            <text:p>1</text:p>
          </table:table-cell>
          <table:table-cell office:value-type="string" calcext:value-type="string">
            <text:p><text:a xlink:href="https://allegro.pl/oferta/silnik-krokowy-do-drukarki-17hs8401-kabel-15601388050" xlink:type="simple">allegro.pl-100hz_pl</text:a></text:p>
          </table:table-cell>
          <table:table-cell table:style-name="ce29" office:value-type="float" office:value="48.5" calcext:value-type="float">
            <text:p>48.50</text:p>
          </table:table-cell>
          <table:table-cell table:style-name="ce27" table:formula="of:=[.E13] * [.C13]" office:value-type="float" office:value="48.5" calcext:value-type="float">
            <text:p>48.5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5x8mm-flexible-coupler" calcext:value-type="string">
            <text:p>5x8mm-flexible-coupler</text:p>
          </table:table-cell>
          <table:table-cell table:style-name="ce14" table:formula="of:=VLOOKUP([.A14];[$'Parts list'.B:.D];3;0)" office:value-type="float" office:value="0" calcext:value-type="float">
            <text:p/>
          </table:table-cell>
          <table:table-cell table:style-name="ce15" table:formula="of:=COUNTIF([$'Parts list'.$B$2:.$B$1048576]; [.A14])" office:value-type="float" office:value="1" calcext:value-type="float">
            <text:p>1</text:p>
          </table:table-cell>
          <table:table-cell office:value-type="string" calcext:value-type="string">
            <text:p><text:a xlink:href="https://abc-rc.pl/pl/products/sprzeglo-elastyczne-5-8-mm-sprzeglo-aluminiowe-do-drukarki-3d-6460.html" xlink:type="simple">abc-rc.pl</text:a></text:p>
          </table:table-cell>
          <table:table-cell table:style-name="ce29" office:value-type="float" office:value="5.8" calcext:value-type="float">
            <text:p>5.80</text:p>
          </table:table-cell>
          <table:table-cell table:style-name="ce27" table:formula="of:=[.E14] * [.C14]" office:value-type="float" office:value="5.8" calcext:value-type="float">
            <text:p>5.80</text:p>
          </table:table-cell>
          <table:table-cell table:number-columns-repeated="16377"/>
        </table:table-row>
        <table:table-row table:style-name="ro1">
          <table:table-cell table:style-name="ce22" office:value-type="string" office:string-value="lm8uu-45mm-linear-bearing" calcext:value-type="string">
            <text:p>lm8uu-45mm-linear-bearing</text:p>
          </table:table-cell>
          <table:table-cell table:style-name="ce14" table:formula="of:=VLOOKUP([.A15];[$'Parts list'.B:.D];3;0)" office:value-type="float" office:value="0" calcext:value-type="float">
            <text:p/>
          </table:table-cell>
          <table:table-cell table:style-name="ce15" table:formula="of:=COUNTIF([$'Parts list'.$B$2:.$B$1048576]; [.A15])" office:value-type="float" office:value="2" calcext:value-type="float">
            <text:p>2</text:p>
          </table:table-cell>
          <table:table-cell office:value-type="string" calcext:value-type="string">
            <text:p><text:a xlink:href="https://abc-rc.pl/pl/products/lozysko-liniowe-lm8uu-8mm-45mm-dl-reprap-3d-cnc-9713.html" xlink:type="simple">abc-rc.pl</text:a></text:p>
          </table:table-cell>
          <table:table-cell table:style-name="ce29" office:value-type="float" office:value="8.4" calcext:value-type="float">
            <text:p>8.40</text:p>
          </table:table-cell>
          <table:table-cell table:style-name="ce27" table:formula="of:=[.E15] * [.C15]" office:value-type="float" office:value="16.8" calcext:value-type="float">
            <text:p>16.8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 table:number-columns-spanned="6" table:number-rows-spanned="1">
            <text:p>Custom parts</text:p>
          </table:table-cell>
          <table:covered-table-cell table:style-name="ce14" table:formula="of:=VLOOKUP([.A16];[$'Parts list'.B:.D];3;0)" office:value-type="string" office:string-value="" calcext:value-type="error">
            <text:p>#N/A</text:p>
          </table:covered-table-cell>
          <table:covered-table-cell table:style-name="ce15" table:formula="of:=COUNTIF([$'Parts list'.$B$2:.$B$1048576]; [.A16])" office:value-type="float" office:value="0" calcext:value-type="float">
            <text:p>0</text:p>
          </table:covered-table-cell>
          <table:covered-table-cell table:number-columns-repeated="2"/>
          <table:covered-table-cell table:style-name="ce27" table:formula="of:=[.E16] * [.C16]" office:value-type="float" office:value="0" calcext:value-type="float">
            <text:p>0.00</text:p>
          </table:covered-table-cell>
          <table:table-cell table:number-columns-repeated="16377"/>
        </table:table-row>
        <table:table-row table:style-name="ro1">
          <table:table-cell table:style-name="ce12" table:number-matrix-columns-spanned="1" table:number-matrix-rows-spanned="3" table:formula="of:=COM.MICROSOFT.UNIQUE(COM.MICROSOFT.FILTER([$'Parts list'.B2:.B1048576]; ([$'Parts list'.C2:.C1048576] = &quot;External-custom&quot;) * (ISNUMBER(SEARCH(&quot;linear-shaft&quot;; [$'Parts list'.B2:.B1048576])))))" office:value-type="string" office:string-value="heater-module-8mm-linear-shaft" calcext:value-type="string">
            <text:p>heater-module-8mm-linear-shaft</text:p>
          </table:table-cell>
          <table:table-cell table:style-name="ce14" table:formula="of:=VLOOKUP([.A17];[$'Parts list'.B:.D];3;0)" office:value-type="string" office:string-value="72mm length" calcext:value-type="string">
            <text:p>72mm length</text:p>
          </table:table-cell>
          <table:table-cell table:style-name="ce15" table:formula="of:=COUNTIF([$'Parts list'.$B$2:.$B$1048576]; [.A17])" office:value-type="float" office:value="2" calcext:value-type="float">
            <text:p>2</text:p>
          </table:table-cell>
          <table:table-cell office:value-type="string" calcext:value-type="string" table:number-columns-spanned="1" table:number-rows-spanned="3">
            <text:p><text:a xlink:href="https://www.v-slot.pl/walek-liniowy-prowadnica-fi-8mm" xlink:type="simple">v-slot.pl</text:a></text:p>
          </table:table-cell>
          <table:table-cell table:style-name="ce29" office:value-type="float" office:value="35" calcext:value-type="float" table:number-columns-spanned="1" table:number-rows-spanned="3">
            <text:p>35.00</text:p>
          </table:table-cell>
          <table:table-cell table:style-name="ce29" table:formula="of:=[.E17]" office:value-type="float" office:value="35" calcext:value-type="float" table:number-columns-spanned="1" table:number-rows-spanned="3">
            <text:p>35.00</text:p>
          </table:table-cell>
          <table:table-cell table:number-columns-repeated="16377"/>
        </table:table-row>
        <table:table-row table:style-name="ro1">
          <table:table-cell table:style-name="ce15" office:value-type="string" office:string-value="x-axis-8mm-linear-shaft" calcext:value-type="string">
            <text:p>x-axis-8mm-linear-shaft</text:p>
          </table:table-cell>
          <table:table-cell table:style-name="ce14" table:formula="of:=VLOOKUP([.A18];[$'Parts list'.B:.D];3;0)" office:value-type="string" office:string-value="200mm length" calcext:value-type="string">
            <text:p>200mm length</text:p>
          </table:table-cell>
          <table:table-cell table:style-name="ce15" table:formula="of:=COUNTIF([$'Parts list'.$B$2:.$B$1048576]; [.A18])" office:value-type="float" office:value="2" calcext:value-type="float">
            <text:p>2</text:p>
          </table:table-cell>
          <table:covered-table-cell/>
          <table:covered-table-cell table:number-columns-repeated="2" table:style-name="ce15"/>
          <table:table-cell table:number-columns-repeated="16377"/>
        </table:table-row>
        <table:table-row table:style-name="ro1">
          <table:table-cell table:style-name="ce15" office:value-type="string" office:string-value="z-axis-8mm-linear-shaft" calcext:value-type="string">
            <text:p>z-axis-8mm-linear-shaft</text:p>
          </table:table-cell>
          <table:table-cell table:style-name="ce14" table:formula="of:=VLOOKUP([.A19];[$'Parts list'.B:.D];3;0)" office:value-type="string" office:string-value="197mm length" calcext:value-type="string">
            <text:p>197mm length</text:p>
          </table:table-cell>
          <table:table-cell table:style-name="ce15" table:formula="of:=COUNTIF([$'Parts list'.$B$2:.$B$1048576]; [.A19])" office:value-type="float" office:value="2" calcext:value-type="float">
            <text:p>2</text:p>
          </table:table-cell>
          <table:covered-table-cell/>
          <table:covered-table-cell table:number-columns-repeated="2" table:style-name="ce15"/>
          <table:table-cell table:number-columns-repeated="16377"/>
        </table:table-row>
        <table:table-row table:style-name="ro3">
          <table:table-cell table:style-name="ce15" table:number-matrix-columns-spanned="1" table:number-matrix-rows-spanned="7" table:formula="of:=COM.MICROSOFT.UNIQUE(COM.MICROSOFT.FILTER([$'Parts list'.B2:.B1048576]; ([$'Parts list'.C2:.C1048576] = &quot;External-custom&quot;) * (NOT(ISNUMBER(SEARCH(&quot;linear-shaft&quot;; [$'Parts list'.B2:.B1048576]))))))" office:value-type="string" office:string-value="base-top" calcext:value-type="string">
            <text:p>base-top</text:p>
          </table:table-cell>
          <table:table-cell table:formula="of:=VLOOKUP([.A20];[$'Parts list'.B:.D];3;0)" office:value-type="string" office:string-value="260x180mm plane, custom cutout" calcext:value-type="string">
            <text:p>260x180mm plane, custom cutout</text:p>
          </table:table-cell>
          <table:table-cell table:style-name="ce15" table:formula="of:=COUNTIF([$'Parts list'.$B$2:.$B$1048576]; [.A20])" office:value-type="float" office:value="1" calcext:value-type="float">
            <text:p>1</text:p>
          </table:table-cell>
          <table:table-cell office:value-type="string" calcext:value-type="string" table:number-columns-spanned="1" table:number-rows-spanned="4">
            <text:p><text:a xlink:href="https://allegro.pl/oferta/sklejka-5mm-formatka-600x400mm-klasa-2-do-lasera-8141591806" xlink:type="simple">allegro.pl-Betulla_com_pl</text:a></text:p>
          </table:table-cell>
          <table:table-cell table:style-name="ce30" office:value-type="float" office:value="15.2" calcext:value-type="float" table:number-columns-spanned="1" table:number-rows-spanned="4">
            <text:p>15.20</text:p>
          </table:table-cell>
          <table:table-cell table:style-name="ce30" table:formula="of:=[.E20]" office:value-type="float" office:value="15.2" calcext:value-type="float" table:number-columns-spanned="1" table:number-rows-spanned="4">
            <text:p>15.20</text:p>
          </table:table-cell>
          <table:table-cell table:number-columns-repeated="16377"/>
        </table:table-row>
        <table:table-row table:style-name="ro3">
          <table:table-cell table:style-name="ce15" office:value-type="string" office:string-value="base-left-side" calcext:value-type="string">
            <text:p>base-left-side</text:p>
          </table:table-cell>
          <table:table-cell table:formula="of:=VLOOKUP([.A21];[$'Parts list'.B:.D];3;0)" office:value-type="string" office:string-value="60x180mm plane, custom cutout" calcext:value-type="string">
            <text:p>60x180mm plane, custom cutout</text:p>
          </table:table-cell>
          <table:table-cell table:style-name="ce15" table:formula="of:=COUNTIF([$'Parts list'.$B$2:.$B$1048576]; [.A21])" office:value-type="float" office:value="1" calcext:value-type="float">
            <text:p>1</text:p>
          </table:table-cell>
          <table:covered-table-cell/>
          <table:covered-table-cell table:number-columns-repeated="2" table:style-name="ce15"/>
          <table:table-cell table:number-columns-repeated="16377"/>
        </table:table-row>
        <table:table-row table:style-name="ro3">
          <table:table-cell table:style-name="ce15" office:value-type="string" office:string-value="base-right-side" calcext:value-type="string">
            <text:p>base-right-side</text:p>
          </table:table-cell>
          <table:table-cell table:formula="of:=VLOOKUP([.A22];[$'Parts list'.B:.D];3;0)" office:value-type="string" office:string-value="60x180mm plane, custom cutout" calcext:value-type="string">
            <text:p>60x180mm plane, custom cutout</text:p>
          </table:table-cell>
          <table:table-cell table:style-name="ce15" table:formula="of:=COUNTIF([$'Parts list'.$B$2:.$B$1048576]; [.A22])" office:value-type="float" office:value="1" calcext:value-type="float">
            <text:p>1</text:p>
          </table:table-cell>
          <table:covered-table-cell/>
          <table:covered-table-cell table:number-columns-repeated="2" table:style-name="ce15"/>
          <table:table-cell table:number-columns-repeated="16377"/>
        </table:table-row>
        <table:table-row table:style-name="ro3">
          <table:table-cell table:style-name="ce15" office:value-type="string" office:string-value="base-bottom" calcext:value-type="string">
            <text:p>base-bottom</text:p>
          </table:table-cell>
          <table:table-cell table:formula="of:=VLOOKUP([.A23];[$'Parts list'.B:.D];3;0)" office:value-type="string" office:string-value="260x180mm plane, custom cutout" calcext:value-type="string">
            <text:p>260x180mm plane, custom cutout</text:p>
          </table:table-cell>
          <table:table-cell table:style-name="ce15" table:formula="of:=COUNTIF([$'Parts list'.$B$2:.$B$1048576]; [.A23])" office:value-type="float" office:value="1" calcext:value-type="float">
            <text:p>1</text:p>
          </table:table-cell>
          <table:covered-table-cell/>
          <table:covered-table-cell table:number-columns-repeated="2" table:style-name="ce15"/>
          <table:table-cell table:number-columns-repeated="16377"/>
        </table:table-row>
        <table:table-row table:style-name="ro1">
          <table:table-cell table:style-name="ce15" office:value-type="string" office:string-value="heater-module-lw980-heater-tray" calcext:value-type="string">
            <text:p>heater-module-lw980-heater-tray</text:p>
          </table:table-cell>
          <table:table-cell table:style-name="ce14" table:formula="of:=VLOOKUP([.A24];[$'Parts list'.B:.D];3;0)" office:value-type="string" office:string-value="CNC" calcext:value-type="string">
            <text:p>CNC</text:p>
          </table:table-cell>
          <table:table-cell table:style-name="ce15" table:formula="of:=COUNTIF([$'Parts list'.$B$2:.$B$1048576]; [.A24])" office:value-type="float" office:value="1" calcext:value-type="float">
            <text:p>1</text:p>
          </table:table-cell>
          <table:table-cell/>
          <table:table-cell table:style-name="ce15" table:number-columns-repeated="2"/>
          <table:table-cell table:number-columns-repeated="16377"/>
        </table:table-row>
        <table:table-row table:style-name="ro1">
          <table:table-cell table:style-name="ce15" office:value-type="string" office:string-value="bd-microlance-3-26g-needle" calcext:value-type="string">
            <text:p>bd-microlance-3-26g-needle</text:p>
          </table:table-cell>
          <table:table-cell table:style-name="ce14" table:formula="of:=VLOOKUP([.A25];[$'Parts list'.B:.D];3;0)" office:value-type="string" office:string-value="7mm needle length" calcext:value-type="string">
            <text:p>7mm needle length</text:p>
          </table:table-cell>
          <table:table-cell table:style-name="ce15" table:formula="of:=COUNTIF([$'Parts list'.$B$2:.$B$1048576]; [.A25])" office:value-type="float" office:value="1" calcext:value-type="float">
            <text:p>1</text:p>
          </table:table-cell>
          <table:table-cell office:value-type="string" calcext:value-type="string">
            <text:p><text:a xlink:href="https://medimall.pl/Igly-iniekcyjne-BD-MICROLANCE-045x13-26G-303800-100-sz" xlink:type="simple">medimall.pl</text:a>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table:formula="of:=[.E25]" office:value-type="float" office:value="0.11" calcext:value-type="float">
            <text:p>0.11</text:p>
          </table:table-cell>
          <table:table-cell table:number-columns-repeated="16377"/>
        </table:table-row>
        <table:table-row table:style-name="ro1">
          <table:table-cell table:style-name="ce15" office:value-type="string" office:string-value="z-axis-tr8x2-lead-screw" calcext:value-type="string">
            <text:p>z-axis-tr8x2-lead-screw</text:p>
          </table:table-cell>
          <table:table-cell table:style-name="ce14" table:formula="of:=VLOOKUP([.A26];[$'Parts list'.B:.D];3;0)" office:value-type="string" office:string-value="113mm length" calcext:value-type="string">
            <text:p>113mm length</text:p>
          </table:table-cell>
          <table:table-cell table:style-name="ce15" table:formula="of:=COUNTIF([$'Parts list'.$B$2:.$B$1048576]; [.A26])" office:value-type="float" office:value="1" calcext:value-type="float">
            <text:p>1</text:p>
          </table:table-cell>
          <table:table-cell office:value-type="string" calcext:value-type="string">
            <text:p><text:a xlink:href="https://allegro.pl/oferta/sruba-trapezowa-tr8x2-300mm-nakretka-16298195628" xlink:type="simple">allegro.pl-wizjerMP</text:a>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formula="of:=[.E26]" office:value-type="float" office:value="26.05" calcext:value-type="float">
            <text:p>26.05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15" table:number-columns-repeated="2"/>
          <table:table-cell/>
          <table:table-cell table:style-name="ce15" table:number-columns-repeated="2"/>
          <table:table-cell table:number-columns-repeated="16377"/>
        </table:table-row>
        <table:table-row table:style-name="ro1" table:number-rows-repeated="18">
          <table:table-cell table:style-name="ce15" table:number-columns-repeated="3"/>
          <table:table-cell/>
          <table:table-cell table:style-name="ce15" table:number-columns-repeated="2"/>
          <table:table-cell table:number-columns-repeated="16377"/>
        </table:table-row>
        <table:table-row table:style-name="ro1" table:number-rows-repeated="1048523">
          <table:table-cell table:number-columns-repeated="16383"/>
        </table:table-row>
        <table:table-row table:style-name="ro4" table:number-rows-repeated="7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  <table:database-ranges>
        <table:database-range table:name="__Anonymous_Sheet_DB__1" table:target-range-address="External.A17:External.C2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SauceCodePro NF" svg:font-family="'SauceCodePro NF'" style:font-family-generic="swiss" style:font-pitch="variable"/>
    <style:font-face style:name="SauceCodePro NF1" svg:font-family="'SauceCodePro NF'" style:font-pitch="fixed"/>
    <style:font-face style:name="SauceCodePro NF2" svg:font-family="'SauceCodePro NF'" style:font-family-generic="roman" style:font-pitch="variable"/>
    <style:font-face style:name="SauceCodePro NF3" svg:font-family="'SauceCodePro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SauceCodePro NF" fo:font-size="10pt" fo:language="en" fo:country="US" style:font-name-asian="SauceCodePro NF3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SauceCodePro NF2" fo:font-size="12pt" fo:language="en" fo:country="US" style:letter-kerning="true" style:font-name-asian="Cantarell" style:font-size-asian="12pt" style:language-asian="zh" style:country-asian="CN" style:font-name-complex="SauceCodePro NF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44475a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uceCodePro NF" fo:font-family="'SauceCodePro NF'" style:font-family-generic="swiss" style:font-pitch="variable" fo:font-size="10pt" style:font-name-asian="SauceCodePro NF3" style:font-family-asian="'SauceCodePro NF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9:53:43.260188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1:55.899398964</meta:creation-date>
    <meta:generator>LibreOffice/24.8.2.1$Linux_X86_64 LibreOffice_project/480$Build-1</meta:generator>
    <dc:date>2024-11-15T01:17:57.931740961</dc:date>
    <meta:editing-duration>PT22H4M8S</meta:editing-duration>
    <meta:editing-cycles>188</meta:editing-cycles>
    <meta:document-statistic meta:table-count="2" meta:cell-count="332" meta:object-count="0"/>
  </office:meta>
</office:document-meta>
</file>